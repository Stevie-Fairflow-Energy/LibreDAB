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818000004C2A56DC43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118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8"/>
    <style:style style:name="ce3" style:family="table-cell" style:parent-style-name="Default" style:data-style-name="N11"/>
    <style:style style:name="ce4" style:family="table-cell" style:parent-style-name="Default" style:data-style-name="N81"/>
    <style:style style:name="ce5" style:family="table-cell" style:parent-style-name="Default" style:data-style-name="N118">
      <style:text-properties fo:font-weight="bold" style:font-weight-asian="bold" style:font-weight-complex="bold"/>
    </style:style>
    <style:style style:name="ce10" style:family="table-cell" style:parent-style-name="Default">
      <style:text-properties style:font-name="Liberation Serif" style:font-name-asian="Segoe UI" style:font-name-complex="Tahoma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Kern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(W)</text:p>
          </table:table-cell>
          <table:table-cell office:value-type="float" office:value="1250" calcext:value-type="float">
            <text:p>1250</text:p>
          </table:table-cell>
          <table:table-cell/>
        </table:table-row>
        <table:table-row table:style-name="ro1">
          <table:table-cell office:value-type="string" calcext:value-type="string">
            <text:p>Fsw (Hz)</text:p>
          </table:table-cell>
          <table:table-cell table:style-name="ce2" office:value-type="float" office:value="100000" calcext:value-type="float">
            <text:p>100.00E+03</text:p>
          </table:table-cell>
          <table:table-cell/>
        </table:table-row>
        <table:table-row table:style-name="ro1">
          <table:table-cell office:value-type="string" calcext:value-type="string">
            <text:p>Leakage (H)</text:p>
          </table:table-cell>
          <table:table-cell table:style-name="ce2" office:value-type="float" office:value="0.000052" calcext:value-type="float">
            <text:p>52.00E-06</text:p>
          </table:table-cell>
          <table:table-cell/>
        </table:table-row>
        <table:table-row table:style-name="ro1">
          <table:table-cell office:value-type="string" calcext:value-type="string">
            <text:p>Input Voltage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I_Llk_peak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ngle1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Angle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Gain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sign aim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(W)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Gain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Angle1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Angle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LV st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efficiency (%)</text:p>
          </table:table-cell>
          <table:table-cell table:style-name="ce3" office:value-type="percentage" office:value="0.95" calcext:value-type="percentage">
            <text:p>95.00%</text:p>
          </table:table-cell>
          <table:table-cell/>
        </table:table-row>
        <table:table-row table:style-name="ro1">
          <table:table-cell office:value-type="string" calcext:value-type="string">
            <text:p>Vnom (V)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string" calcext:value-type="string">
            <text:p>Vmin (V)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string" calcext:value-type="string">
            <text:p>Vmax (V)</text:p>
          </table:table-cell>
          <table:table-cell office:value-type="float" office:value="58.8" calcext:value-type="float">
            <text:p>58.8</text:p>
          </table:table-cell>
          <table:table-cell/>
        </table:table-row>
        <table:table-row table:style-name="ro1">
          <table:table-cell office:value-type="string" calcext:value-type="string">
            <text:p>Imax (A)</text:p>
          </table:table-cell>
          <table:table-cell table:formula="of:=([.B12]/[.B19])*(1+1-[.B17])" office:value-type="float" office:value="35.2941176470588" calcext:value-type="float">
            <text:p>35.2941176470588</text:p>
          </table:table-cell>
          <table:table-cell/>
        </table:table-row>
        <table:table-row table:style-name="ro1">
          <table:table-cell office:value-type="string" calcext:value-type="string">
            <text:p>HV st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om (V)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Vmax (V)</text:p>
          </table:table-cell>
          <table:table-cell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Vmin (V)</text:p>
          </table:table-cell>
          <table:table-cell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Imax (A)</text:p>
          </table:table-cell>
          <table:table-cell table:formula="of:=([.B12]/[.B25])*(1+1-[.B17])" office:value-type="float" office:value="2.33333333333333" calcext:value-type="float">
            <text:p>2.33333333333333</text:p>
          </table:table-cell>
          <table:table-cell/>
        </table:table-row>
        <table:table-row table:style-name="ro1">
          <table:table-cell office:value-type="string" calcext:value-type="string">
            <text:p>Fsw (Hz)</text:p>
          </table:table-cell>
          <table:table-cell table:style-name="ce4" office:value-type="float" office:value="500000" calcext:value-type="float">
            <text:p>5.00E+05</text:p>
          </table:table-cell>
          <table:table-cell/>
        </table:table-row>
        <table:table-row table:style-name="ro1">
          <table:table-cell office:value-type="string" calcext:value-type="string">
            <text:p>T (s)</text:p>
          </table:table-cell>
          <table:table-cell table:style-name="ce2" table:formula="of:=1/[.B27]" office:value-type="float" office:value="0.000002" calcext:value-type="float">
            <text:p>2.00E-06</text:p>
          </table:table-cell>
          <table:table-cell/>
        </table:table-row>
        <table:table-row table:style-name="ro1">
          <table:table-cell office:value-type="string" calcext:value-type="string">
            <text:p>Tangle2 (s)</text:p>
          </table:table-cell>
          <table:table-cell table:style-name="ce2" table:formula="of:=([.B15]/360)*[.B28]" office:value-type="float" office:value="0.000000333333333333333" calcext:value-type="float">
            <text:p>333.33E-09</text:p>
          </table:table-cell>
          <table:table-cell/>
        </table:table-row>
        <table:table-row table:style-name="ro1">
          <table:table-cell office:value-type="string" calcext:value-type="string">
            <text:p>k_voltage</text:p>
          </table:table-cell>
          <table:table-cell table:formula="of:=([.B18]/[.B5])^2" office:value-type="float" office:value="0.014161" calcext:value-type="float">
            <text:p>0.014161</text:p>
          </table:table-cell>
          <table:table-cell/>
        </table:table-row>
        <table:table-row table:style-name="ro1">
          <table:table-cell office:value-type="string" calcext:value-type="string">
            <text:p>k_power</text:p>
          </table:table-cell>
          <table:table-cell table:formula="of:=[.B12]/([.B2]*[.B30])" office:value-type="float" office:value="45.1945484075983" calcext:value-type="float">
            <text:p>45.1945484075983</text:p>
          </table:table-cell>
          <table:table-cell/>
        </table:table-row>
        <table:table-row table:style-name="ro1">
          <table:table-cell office:value-type="string" calcext:value-type="string">
            <text:p>k_frequency</text:p>
          </table:table-cell>
          <table:table-cell table:formula="of:=[.B27]/[.B3]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L_lk (H)</text:p>
          </table:table-cell>
          <table:table-cell table:style-name="ce5" table:formula="of:=[.B4] / ([.B32]*[.B31])" office:value-type="float" office:value="0.00000023011625" calcext:value-type="float">
            <text:p>230.12E-09</text:p>
          </table:table-cell>
          <table:table-cell/>
        </table:table-row>
        <table:table-row table:style-name="ro1">
          <table:table-cell table:style-name="ce1" office:value-type="string" calcext:value-type="string">
            <text:p>C_dcblock (F)</text:p>
          </table:table-cell>
          <table:table-cell table:style-name="ce5" table:formula="of:=100*(1/(4*PI()^2*[.B27]^2*[.B33]))" office:value-type="float" office:value="0.0000440304340272961" calcext:value-type="float">
            <text:p>44.03E-06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formula="of:=([.B18]/[.B23])*[.B13]" office:value-type="float" office:value="0.08925" calcext:value-type="float">
            <text:p>0.08925</text:p>
          </table:table-cell>
          <table:table-cell table:formula="of:=1/[.B35]" office:value-type="float" office:value="11.2044817927171" calcext:value-type="float">
            <text:p>11.2044817927171</text:p>
          </table:table-cell>
        </table:table-row>
        <table:table-row table:style-name="ro1">
          <table:table-cell office:value-type="string" calcext:value-type="string">
            <text:p>I_Llk_peak</text:p>
          </table:table-cell>
          <table:table-cell table:formula="of:=(([.B18]*[.B29]*2)/[.B33])/2" office:value-type="float" office:value="34.4753285929756" calcext:value-type="float">
            <text:p>34.4753285929756</text:p>
          </table:table-cell>
          <table:table-cell office:value-type="string" calcext:value-type="string">
            <text:p>A consistent underestimate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1" office:value-type="string" calcext:value-type="string">
            <text:p>Design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(N2/N1)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_lk (H)</text:p>
          </table:table-cell>
          <table:table-cell table:style-name="ce2" table:formula="of:=[.B33]" office:value-type="float" office:value="0.00000023011625" calcext:value-type="float">
            <text:p>230.12E-09</text:p>
          </table:table-cell>
          <table:table-cell/>
        </table:table-row>
        <table:table-row table:style-name="ro1">
          <table:table-cell office:value-type="string" calcext:value-type="string">
            <text:p>Power (W)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Ga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sw (Hz)</text:p>
          </table:table-cell>
          <table:table-cell table:style-name="ce2" table:formula="of:=[.B28]" office:value-type="float" office:value="0.000002" calcext:value-type="float">
            <text:p>2.00E-06</text:p>
          </table:table-cell>
          <table:table-cell/>
        </table:table-row>
        <table:table-row table:style-name="ro1">
          <table:table-cell office:value-type="string" calcext:value-type="string">
            <text:p>I_Llk_peak</text:p>
          </table:table-cell>
          <table:table-cell table:number-columns-repeated="2"/>
        </table:table-row>
      </table:table>
      <table:table table:name="Transformer" table:style-name="ta1">
        <table:table-column table:style-name="co3" table:default-cell-style-name="Default"/>
        <table:table-column table:style-name="co2" table:number-columns-repeated="3" table:default-cell-style-name="Default"/>
        <table:table-column table:style-name="co2"/>
        <table:table-row table:style-name="ro1">
          <table:table-cell/>
          <table:table-cell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urn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2" office:value-type="string" calcext:value-type="string">
            <text:p>Litz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MCybernetics Standard</text:p>
          </table:table-cell>
          <table:table-cell office:value-type="string" calcext:value-type="string">
            <text:p>12 A</text:p>
          </table:table-cell>
          <table:table-cell office:value-type="string" calcext:value-type="string">
            <text:p>3 A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trand size (AWG)</text:p>
          </table:table-cell>
          <table:table-cell table:formula="of:=36-39*(LOG(([.B7]/0.127);92))" office:value-type="float" office:value="44.0398272808926" calcext:value-type="float">
            <text:p>44.0398272808926</text:p>
          </table:table-cell>
          <table:table-cell table:formula="of:=36-39*(LOG(([.C7]/0.127);92))" office:value-type="float" office:value="41.1377859747528" calcext:value-type="float">
            <text:p>41.1377859747528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trand size (mm)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Number of strands</text:p>
          </table:table-cell>
          <table:table-cell office:value-type="float" office:value="1000" calcext:value-type="float">
            <text:p>1000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Default"/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Core</text:p>
          </table:table-cell>
          <table:table-cell table:number-columns-repeated="2" office:value-type="string" calcext:value-type="string">
            <text:p>RM12</text:p>
          </table:table-cell>
          <table:table-cell office:value-type="string" calcext:value-type="string">
            <text:p><text:a xlink:href="https://uk.farnell.com/epcos/b65815e0000r049/transformer-core-rm-n49-57mm/dp/4167325" xlink:type="simple">https://uk.farnell.com/epcos/b65815e0000r049/transformer-core-rm-n49-57mm/dp/4167325</text:a></text:p>
          </table:table-cell>
          <table:table-cell table:style-name="Default"/>
        </table:table-row>
        <table:table-row table:style-name="ro1">
          <table:table-cell/>
          <table:table-cell table:style-name="ce10"/>
          <table:table-cell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Default">
            <draw:frame draw:z-index="0" draw:name="Image 1" draw:style-name="gr1" draw:text-style-name="P1" svg:width="42.752cm" svg:height="24.277cm" svg:x="1.954cm" svg:y="0.213cm">
              <draw:image xlink:href="Pictures/1000000100000818000004C2A56DC43B.png" xlink:type="simple" xlink:show="embed" xlink:actuate="onLoad" draw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8">00/00/0000</text:date>, <text:time style:data-style-name="N2" text:time-value="14:37:48.614421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5T16:16:06.796560100</meta:creation-date>
    <dc:date>2026-06-08T17:35:12.945931400</dc:date>
    <meta:editing-duration>PT1H9M30S</meta:editing-duration>
    <meta:editing-cycles>5</meta:editing-cycles>
    <meta:generator>LibreOffice/25.8.6.2$Windows_X86_64 LibreOffice_project/b4b39682cd9868fa725bc664aff94278d315bd04</meta:generator>
    <meta:document-statistic meta:table-count="2" meta:cell-count="107" meta:object-count="1"/>
  </office:meta>
</office:document-meta>
</file>