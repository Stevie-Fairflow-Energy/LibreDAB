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03000002397E93CDB9.png" manifest:media-type="image/png"/>
  <manifest:file-entry manifest:full-path="Pictures/10000001000006400000035C2AE4F9F4.png" manifest:media-type="image/png"/>
  <manifest:file-entry manifest:full-path="Pictures/10000001000002B700000208168AE3FC.png" manifest:media-type="image/png"/>
  <manifest:file-entry manifest:full-path="Pictures/1000000100000379000001E43F612858.png" manifest:media-type="image/png"/>
  <manifest:file-entry manifest:full-path="Pictures/100000010000035B000002A05B613E79.png" manifest:media-type="image/png"/>
  <manifest:file-entry manifest:full-path="Pictures/10000001000003C10000021D1D56CBB1.png" manifest:media-type="image/png"/>
  <manifest:file-entry manifest:full-path="Pictures/10000001000006400000035B76BEE982.png" manifest:media-type="image/png"/>
  <manifest:file-entry manifest:full-path="Pictures/10000001000004F000000342D287D55D.png" manifest:media-type="image/png"/>
  <manifest:file-entry manifest:full-path="Pictures/100000010000064000000334210293C8.png" manifest:media-type="image/png"/>
  <manifest:file-entry manifest:full-path="Pictures/10000001000004EC0000039C21D9201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 style:family="paragraph" style:parent-style-name="Text_20_body">
      <style:text-properties officeooo:rsid="001309ef" officeooo:paragraph-rsid="001309ef"/>
    </style:style>
    <style:style style:name="P5" style:family="paragraph" style:parent-style-name="Text_20_body">
      <style:text-properties officeooo:rsid="00132cf9" officeooo:paragraph-rsid="00132cf9"/>
    </style:style>
    <style:style style:name="P6" style:family="paragraph" style:parent-style-name="Text_20_body">
      <style:text-properties officeooo:rsid="00140536" officeooo:paragraph-rsid="00140536"/>
    </style:style>
    <style:style style:name="P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bold" officeooo:rsid="0011bd7b" officeooo:paragraph-rsid="0011bd7b" style:text-blinking="false" fo:background-color="transparent" style:font-weight-asian="bold" style:font-weight-complex="bold"/>
    </style:style>
    <style:style style:name="P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9" style:family="paragraph" style:parent-style-name="Text_20_body">
      <style:text-properties fo:font-weight="normal"/>
    </style:style>
    <style:style style:name="P10"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11" style:family="paragraph" style:parent-style-name="Heading_20_1">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20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2" style:family="text">
      <style:text-properties fo:font-variant="normal" fo:text-transform="none" fo:color="#1155cc" loext:opacity="100%" style:text-line-through-style="none" style:text-line-through-type="none" style:font-name="Arial2" fo:font-size="11pt" fo:font-style="normal" style:text-underline-style="solid" style:text-underline-width="auto" style:text-underline-color="font-color" fo:font-weight="normal" style:text-blinking="false" fo:background-color="transparent" loext:char-shading-value="0"/>
    </style:style>
    <style:style style:name="T3" style:family="text">
      <style:text-properties officeooo:rsid="000e34f9"/>
    </style:style>
    <style:style style:name="T4" style:family="text">
      <style:text-properties officeooo:rsid="00132cf9"/>
    </style:style>
    <style:style style:name="T5" style:family="text">
      <style:text-properties officeooo:rsid="00140536"/>
    </style:style>
    <style:style style:name="T6" style:family="text">
      <style:text-properties officeooo:rsid="000f430d"/>
    </style:style>
    <style:style style:name="T7" style:family="text">
      <style:text-properties officeooo:rsid="0010b641"/>
    </style:style>
    <style:style style:name="T8" style:family="text">
      <style:text-properties officeooo:rsid="0010c048"/>
    </style:style>
    <style:style style:name="T9" style:family="text">
      <style:text-properties style:font-name="Arial2" fo:font-size="11pt" fo:font-style="normal" fo:font-weight="normal"/>
    </style:style>
    <style:style style:name="T10"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87e242ae-7fff-7399-55e6-2062e2b35e2e"/>Designing a DAB using Scaling Laws</text:p>
      <text:p text:style-name="Text_20_body"/>
      <text:p text:style-name="P2"><text:span text:style-name="T1">Reference: </text:span><text:a xlink:type="simple" xlink:href="https://ridleyengineering.com/images/webinar/DAB_Design_Using_Scaling_Laws.pdf" text:style-name="Internet_20_link" text:visited-style-name="Visited_20_Internet_20_Link"><text:span text:style-name="T2">https://ridleyengineering.com/images/webinar/DAB_Design_Using_Scaling_Laws.pdf</text:span></text:a></text:p>
      <text:p text:style-name="Text_20_body"/>
      <text:p text:style-name="P1">Aims:</text:p>
      <text:p text:style-name="P1">LV stage:</text:p>
      <text:p text:style-name="P1">Vnom = 4<text:span text:style-name="T3">2</text:span> V</text:p>
      <text:p text:style-name="P1">Vmin = 2<text:span text:style-name="T3">3.8</text:span> V</text:p>
      <text:p text:style-name="P1">Vmax = <text:span text:style-name="T3">58.8</text:span> V</text:p>
      <text:p text:style-name="P1">Pnominal = <text:span text:style-name="T3">800</text:span> <text:span text:style-name="T3">W</text:span></text:p>
      <text:p text:style-name="P1">Imax = <text:span text:style-name="T3">35.3</text:span> A</text:p>
      <text:p text:style-name="Text_20_body"/>
      <text:p text:style-name="P1">HV stage:</text:p>
      <text:p text:style-name="P1">Vnom = 400 V</text:p>
      <text:p text:style-name="P1">Vmax = 420 V</text:p>
      <text:p text:style-name="P1">Vmin = 360 V</text:p>
      <text:p text:style-name="P1">Pnominal = <text:span text:style-name="T3">800 W</text:span></text:p>
      <text:p text:style-name="P1">Imax = <text:span text:style-name="T3">2.22</text:span> A</text:p>
      <text:p text:style-name="Text_20_body"/>
      <text:p text:style-name="P1">Fsw starting point = <text:span text:style-name="T3">1000 </text:span>kHz</text:p>
      <text:p text:style-name="P1">Choose a Single Phase Shift mode</text:p>
      <text:p text:style-name="P1">I.e. (Intra bridge) Angle 1 = 180 °</text:p>
      <text:p text:style-name="P1">(Inter bridge) Angle 2 = Control angle up to 45 °</text:p>
      <text:p text:style-name="P1">Gain = 1 </text:p>
      <text:p text:style-name="Text_20_body"/>
      <text:p text:style-name="P3"><text:soft-page-break/><draw:frame draw:style-name="fr1" draw:name="Image1" text:anchor-type="as-char" svg:width="15.928cm" svg:height="11.748cm" draw:z-index="0"><draw:image xlink:href="Pictures/1000000100000303000002397E93CDB9.png" xlink:type="simple" xlink:show="embed" xlink:actuate="onLoad" draw:mime-type="image/png"/></draw:frame></text:p>
      <text:p text:style-name="Text_20_body"/>
      <text:p text:style-name="P3"><draw:frame draw:style-name="fr1" draw:name="Image2" text:anchor-type="as-char" svg:width="15.928cm" svg:height="8.678cm" draw:z-index="1"><draw:image xlink:href="Pictures/1000000100000379000001E43F612858.png" xlink:type="simple" xlink:show="embed" xlink:actuate="onLoad" draw:mime-type="image/png"/></draw:frame></text:p>
      <text:p text:style-name="P3"><text:soft-page-break/><draw:frame draw:style-name="fr1" draw:name="Image3" text:anchor-type="as-char" svg:width="15.928cm" svg:height="11.933cm" draw:z-index="2"><draw:image xlink:href="Pictures/10000001000002B700000208168AE3FC.png" xlink:type="simple" xlink:show="embed" xlink:actuate="onLoad" draw:mime-type="image/png"/></draw:frame></text:p>
      <text:p text:style-name="Text_20_body"/>
      <text:p text:style-name="P3"><draw:frame draw:style-name="fr1" draw:name="Image4" text:anchor-type="as-char" svg:width="15.928cm" svg:height="12.462cm" draw:z-index="3"><draw:image xlink:href="Pictures/100000010000035B000002A05B613E79.png" xlink:type="simple" xlink:show="embed" xlink:actuate="onLoad" draw:mime-type="image/png"/></draw:frame></text:p>
      <text:p text:style-name="Text_20_body"><text:soft-page-break/></text:p>
      <text:p text:style-name="P3"><draw:frame draw:style-name="fr1" draw:name="Image5" text:anchor-type="as-char" svg:width="15.928cm" svg:height="8.969cm" draw:z-index="4"><draw:image xlink:href="Pictures/10000001000003C10000021D1D56CBB1.png" xlink:type="simple" xlink:show="embed" xlink:actuate="onLoad" draw:mime-type="image/png"/></draw:frame></text:p>
      <text:p text:style-name="Text_20_body"/>
      <text:p text:style-name="P1">Kernel power: <text:span text:style-name="T4">1050</text:span> W (Angle 1 = 180 °, Angle 2 = 45 °, Gain = 1.<text:span text:style-name="T4">5</text:span>)</text:p>
      <text:p text:style-name="P1">Kernel Fsw = 100 kHz</text:p>
      <text:p text:style-name="P1">Kernel Leakage = 5.2e-05 H</text:p>
      <text:p text:style-name="P1">Kernel Input voltage: 200 V</text:p>
      <text:p text:style-name="P1">I_Llk_peak = 10 A </text:p>
      <text:p text:style-name="Text_20_body"/>
      <text:p text:style-name="P1">Aims:</text:p>
      <text:p text:style-name="P1">LV stage:</text:p>
      <text:p text:style-name="P1">Vnom = 4<text:span text:style-name="T3">2</text:span> V</text:p>
      <text:p text:style-name="P1">Vmin = 2<text:span text:style-name="T3">3.8</text:span> V</text:p>
      <text:p text:style-name="P1">Vmax = <text:span text:style-name="T3">58.8</text:span> V</text:p>
      <text:p text:style-name="P1">Pnominal = <text:span text:style-name="T3">800</text:span> W</text:p>
      <text:p text:style-name="P1">Imax = <text:span text:style-name="T3">35.3 </text:span>A</text:p>
      <text:p text:style-name="Text_20_body"/>
      <text:p text:style-name="P4">To cope with the high voltage input range, we need to make use of the non linear DAB characteristics.</text:p>
      <text:p text:style-name="P5">We want to operate the DAB at 1.5 gain, <text:span text:style-name="T5">Angle2 at 60 degrees, </text:span>at the lowest part of the voltage range.</text:p>
      <text:p text:style-name="P5">This results in a L_lk of ~<text:span text:style-name="T5">115</text:span> nH and a C_dcblock of ~2<text:span text:style-name="T5">2</text:span> uF.</text:p>
      <text:p text:style-name="P6">How practical is a L_lk of 115 nH?</text:p>
      <text:p text:style-name="Text_20_body"/>
      <text:p text:style-name="P1">HV stage:</text:p>
      <text:p text:style-name="P1"><text:soft-page-break/>Vnom = 400 V</text:p>
      <text:p text:style-name="P1">Vmax = 420 V</text:p>
      <text:p text:style-name="P1">Vmin = 360 V</text:p>
      <text:p text:style-name="P1">Pnominal = <text:span text:style-name="T3">800</text:span> W</text:p>
      <text:p text:style-name="P1">Imax = <text:span text:style-name="T3">2.22</text:span> A</text:p>
      <text:p text:style-name="Text_20_body"/>
      <text:p text:style-name="P1">Fsw starting point = 100<text:span text:style-name="T3">0</text:span> kHz</text:p>
      <text:p text:style-name="P1">T = 1 / 100<text:span text:style-name="T3">0</text:span> kHz = 1 us</text:p>
      <text:p text:style-name="P1">Tangle2 = <text:span text:style-name="T3">0.125*T = 0.</text:span>125 us</text:p>
      <text:p text:style-name="P1">Choose a Single Phase Shift mode</text:p>
      <text:p text:style-name="P1">I.e. (Intra bridge) Angle 1 = 180 °</text:p>
      <text:p text:style-name="P1">(Inter bridge) Angle 2 = Control angle up to 45 °</text:p>
      <text:p text:style-name="P1">Gain = 1 </text:p>
      <text:p text:style-name="Text_20_body"/>
      <text:p text:style-name="P1">k_voltage = Vin_eff / Vkernel = 4<text:span text:style-name="T3">2</text:span> / 200 = 0.2<text:span text:style-name="T3">1</text:span> -&gt; Power “boost” 0.24^2 = 0.0<text:span text:style-name="T3">0441</text:span></text:p>
      <text:p text:style-name="P1">k_power = Peff / Pkernel = <text:span text:style-name="T3">800</text:span> / (750*0.2<text:span text:style-name="T6">1</text:span>^2) = <text:span text:style-name="T6">24.187</text:span></text:p>
      <text:p text:style-name="P1">k_frequency = f_eff / f_kernel = 100<text:span text:style-name="T6">0</text:span> k / 100 k = 1<text:span text:style-name="T6">0</text:span></text:p>
      <text:p text:style-name="Text_20_body"/>
      <text:p text:style-name="P1">L_lk = Lkernel / (k_frequency x k_power) = 52 uH / (1<text:span text:style-name="T6">0</text:span>*<text:span text:style-name="T6">24.187</text:span>) = 0.<text:span text:style-name="T7">215</text:span> uH</text:p>
      <text:p text:style-name="P1">C_dcblock = 100 x ( 1 / (4 x pi^2 x f^2 x L_lk) = <text:span text:style-name="T7">12</text:span> uF</text:p>
      <text:p text:style-name="P1">N = Np / Ns = 4<text:span text:style-name="T7">2</text:span> / 4<text:span text:style-name="T7">00</text:span> = 0.1<text:span text:style-name="T7">05</text:span></text:p>
      <text:p text:style-name="P1"/>
      <text:p text:style-name="P7">CHECK FROM HERE</text:p>
      <text:p text:style-name="P1">I_Llk_peak = (I_Llk_peak_kernel * k_voltage) * (Peff / Pkernel) = (10 * 0.24) / (5000 / 750) = 277.77 A</text:p>
      <text:p text:style-name="P1">Cout = (I_Llk_peak * (N - Pout / Vout)) * ( (T/2 - Tangle2) / deltaVout) = (277.77 * 0.114 - 5000/420) * ( (10u/2 - 1.25u) / 1) = 105 uF</text:p>
      <text:p text:style-name="Text_20_body"/>
      <text:p text:style-name="P3"><text:soft-page-break/><draw:frame draw:style-name="fr1" draw:name="Image6" text:anchor-type="as-char" svg:width="15.928cm" svg:height="10.504cm" draw:z-index="5"><draw:image xlink:href="Pictures/10000001000004F000000342D287D55D.png" xlink:type="simple" xlink:show="embed" xlink:actuate="onLoad" draw:mime-type="image/png"/></draw:frame></text:p>
      <text:p text:style-name="P3"><draw:frame draw:style-name="fr1" draw:name="Image7" text:anchor-type="as-char" svg:width="15.928cm" svg:height="8.546cm" draw:z-index="6"><draw:image xlink:href="Pictures/10000001000006400000035B76BEE982.png" xlink:type="simple" xlink:show="embed" xlink:actuate="onLoad" draw:mime-type="image/png"/></draw:frame></text:p>
      <text:p text:style-name="Text_20_body"/>
      <text:p text:style-name="P3"><text:soft-page-break/><draw:frame draw:style-name="fr1" draw:name="Image8" text:anchor-type="as-char" svg:width="15.928cm" svg:height="8.546cm" draw:z-index="7"><draw:image xlink:href="Pictures/10000001000006400000035C2AE4F9F4.png" xlink:type="simple" xlink:show="embed" xlink:actuate="onLoad" draw:mime-type="image/png"/></draw:frame></text:p>
      <text:p text:style-name="Text_20_body"/>
      <text:p text:style-name="P1">Validation:</text:p>
      <text:p text:style-name="P1">396 V on <text:span text:style-name="T8">200</text:span> Ohm resistor -&gt; P = V^2 / R = (396^2) / 35 = 4480.457 W</text:p>
      <text:p text:style-name="Text_20_body"/>
      <text:p text:style-name="P1">Note that 50 mOhm Rds_on MOSFETs resulted in a significant voltage drop. Changed to 5 mOhm and this is the result. </text:p>
      <text:p text:style-name="Text_20_body"/>
      <text:p text:style-name="P1">Voltage ripple ~ 0.2 V</text:p>
      <text:p text:style-name="Text_20_body"/>
      <text:p text:style-name="P1">Input into openmagnetics:</text:p>
      <text:p text:style-name="P2"><text:span text:style-name="T1">Core: </text:span><text:a xlink:type="simple" xlink:href="https://uk.rs-online.com/web/p/transformer-cores/6479389" text:style-name="Internet_20_link" text:visited-style-name="Visited_20_Internet_20_Link"><text:span text:style-name="T2">https://uk.rs-online.com/web/p/transformer-cores/6479389</text:span></text:a></text:p>
      <text:p text:style-name="P2"><text:span text:style-name="T1">Coil former: </text:span><text:a xlink:type="simple" xlink:href="https://uk.rs-online.com/web/p/transformer-accessories/1253682" text:style-name="Internet_20_link" text:visited-style-name="Visited_20_Internet_20_Link"><text:span text:style-name="T2">https://uk.rs-online.com/web/p/transformer-accessories/1253682</text:span></text:a></text:p>
      <text:p text:style-name="Text_20_body"/>
      <text:p text:style-name="P2"><text:span text:style-name="T1">Windings:</text:span><text:a xlink:type="simple" xlink:href="https://www.rmcybernetics.com/shop/wire-cable/litz-wire" text:style-name="Internet_20_link" text:visited-style-name="Visited_20_Internet_20_Link"><text:span text:style-name="T2">https://www.rmcybernetics.com/shop/wire-cable/litz-wire</text:span></text:a></text:p>
      <text:p text:style-name="P8">“<text:span text:style-name="T9">40A” and “6A” variants for primary and secondary respectively. Should be possible to wind to get ~450 nH leakage</text:span></text:p>
      <text:p text:style-name="P9"><text:line-break/></text:p>
      <text:p text:style-name="P1">Costs:</text:p>
      <text:list text:style-name="L1">
        <text:list-item>
          <text:p text:style-name="P10">Core = £18.54</text:p>
        </text:list-item>
        <text:list-item>
          <text:p text:style-name="P10">Primary wire (1 m) = £18</text:p>
        </text:list-item>
        <text:list-item>
          <text:p text:style-name="P10">Secondary wire (10m) = £38</text:p>
        </text:list-item>
        <text:list-item>
          <text:p text:style-name="P10">Coil former = £10</text:p>
        </text:list-item>
        <text:list-item>
          <text:p text:style-name="P10">Total ~ £85</text:p>
        </text:list-item>
      </text:list>
      <text:p text:style-name="Text_20_body"/>
      <text:p text:style-name="P1"><text:soft-page-break/>Ranges from 293 nH to 1300 nH depending on winding arrangement.</text:p>
      <text:p text:style-name="Text_20_body"/>
      <text:p text:style-name="P3"><draw:frame draw:style-name="fr1" draw:name="Image9" text:anchor-type="as-char" svg:width="15.928cm" svg:height="8.149cm" draw:z-index="8"><draw:image xlink:href="Pictures/100000010000064000000334210293C8.png" xlink:type="simple" xlink:show="embed" xlink:actuate="onLoad" draw:mime-type="image/png"/></draw:frame></text:p>
      <text:p text:style-name="Text_20_body"/>
      <text:p text:style-name="P3"><draw:frame draw:style-name="fr1" draw:name="Image10" text:anchor-type="as-char" svg:width="15.928cm" svg:height="11.668cm" draw:z-index="9"><draw:image xlink:href="Pictures/10000001000004EC0000039C21D9201A.png" xlink:type="simple" xlink:show="embed" xlink:actuate="onLoad" draw:mime-type="image/png"/></draw:frame></text:p>
      <text:p text:style-name="Text_20_body"/>
      <text:p text:style-name="P1">Approximately 44 W of losses to deal with on the E type design. </text:p>
      <text:h text:style-name="P11" text:outline-level="1"><text:soft-page-break/>Magnetics iterations</text:h>
      <text:p text:style-name="P1">Tried out both a Toroidal core and an ETD core.</text:p>
      <text:p text:style-name="P1">The toroidal core option came in at low cost and low loss. 1.7 W core loss, 26 W of winding losses. BUT the winding and mounting arrangements required extra consideration. There was no off-the-shelf mount for the toroid and with Litz wire it wouldn’t be self-supporting.</text:p>
      <text:p text:style-name="Text_20_body"/>
      <text:p text:style-name="P1">So the ETD option comes in with ~22 W of total losses after adjusting the number of windings slightly and the size of the secondary Litz wire. It’s likely the losses of the other variants could have been reduced to these levels with some tweaking. </text:p>
      <text:p text:style-name="Text_20_body"/>
      <text:p text:style-name="P1">Litz vs non-Litz. At 100 kHz and these current levels, the difference between Litz and standard wires was significant! It made 10’s of Watts of loss difference for similar size wires. Likely to cause some serious overheating problems, as well as the efficiency hit!</text:p>
      <text:p text:style-name="P1">The plus side of using the ETD core (ETD 59/31/22) is also that you can buy an off-the-shelf winder and yoke (to clip the core to the winder). This is useful because it gives a really nice mounting arrangement that lets you directly insert the transformer into a PCB or connect up with wires for testing. </text:p>
      <text:p text:style-name="Text_20_body"><text:span text:style-name="T10"><text:line-break/><text:line-break/><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5T16:03:14.399037100</meta:creation-date>
    <dc:date>2026-06-08T15:35:25.325204900</dc:date>
    <meta:editing-duration>PT53M18S</meta:editing-duration>
    <meta:editing-cycles>3</meta:editing-cycles>
    <meta:generator>LibreOffice/25.8.6.2$Windows_X86_64 LibreOffice_project/b4b39682cd9868fa725bc664aff94278d315bd04</meta:generator>
    <meta:document-statistic meta:table-count="0" meta:image-count="10" meta:object-count="0" meta:page-count="9" meta:paragraph-count="93" meta:word-count="746" meta:character-count="3787" meta:non-whitespace-character-count="3115"/>
  </office:meta>
</office:document-meta>
</file>